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5000001C7C2A65B22.png"/>
  <manifest:file-entry manifest:media-type="image/png" manifest:full-path="Pictures/10000201000002E2000000E4F473F2DC.png"/>
  <manifest:file-entry manifest:media-type="image/png" manifest:full-path="Pictures/10000201000002B90000018E08A2D6FB.png"/>
  <manifest:file-entry manifest:media-type="image/png" manifest:full-path="Pictures/100002010000035200000319A614AACE.png"/>
  <manifest:file-entry manifest:media-type="image/png" manifest:full-path="Pictures/10000201000000D0000000505BC0571A.png"/>
  <manifest:file-entry manifest:media-type="image/png" manifest:full-path="Pictures/1000020100000278000001B5CD7CA852.png"/>
  <manifest:file-entry manifest:media-type="image/png" manifest:full-path="Pictures/10000201000003540000010C4AB2C6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ent integrer une BDD Sqlite3 dans power BI</text:h>
      <text:p text:style-name="Text_20_body"/>
      <text:list xml:id="list4373358974007761418" text:style-name="L1">
        <text:list-item>
          <text:p text:style-name="P1">Telecharger le pilote ODBC</text:p>
        </text:list-item>
      </text:list>
      <text:list xml:id="list6436282900422616384" text:style-name="L2">
        <text:list-item>
          <text:p text:style-name="P2"><text:a xlink:type="simple" xlink:href="http://www.ch-werner.de/sqliteodbc/" text:style-name="Internet_20_link" text:visited-style-name="Visited_20_Internet_20_Link">http://www.ch-werner.de/sqliteodbc/</text:a></text:p>
        </text:list-item>
        <text:list-item>
          <text:p text:style-name="P2">Prendre la version 32 ou 64 bits selon votre version power BI</text:p>
        </text:list-item>
      </text:list>
      <text:p text:style-name="Text_20_body"><draw:frame draw:style-name="fr1" draw:name="images2" text:anchor-type="paragraph" svg:width="4.403cm" svg:height="1.693cm" draw:z-index="1"><draw:image xlink:href="Pictures/10000201000000D0000000505BC0571A.png" xlink:type="simple" xlink:show="embed" xlink:actuate="onLoad"/></draw:frame></text:p>
      <text:list xml:id="list3606881009351421987" text:style-name="L3">
        <text:list-item>
          <text:p text:style-name="P3">Telecharger + installer </text:p>
          <text:p text:style-name="P3"/>
        </text:list-item>
      </text:list>
      <text:list xml:id="list28738008" text:continue-list="list4373358974007761418" text:style-name="L1">
        <text:list-item>
          <text:p text:style-name="P1">Ouvrir l'administrateur <text:s/>de source de données ODBC</text:p>
        </text:list-item>
      </text:list>
      <text:list xml:id="list674662744276912084" text:style-name="L4">
        <text:list-header>
          <text:p text:style-name="P4"><draw:frame draw:style-name="fr1" draw:name="images1" text:anchor-type="paragraph" svg:width="15.623cm" svg:height="4.826cm" draw:z-index="0"><draw:image xlink:href="Pictures/10000201000002E2000000E4F473F2DC.png" xlink:type="simple" xlink:show="embed" xlink:actuate="onLoad"/></draw:frame></text:p>
          <text:p text:style-name="P4">- Cliquer sur ajouter </text:p>
          <text:p text:style-name="P4">- Selectionner sqlite3</text:p>
        </text:list-header>
      </text:list>
      <text:p text:style-name="Text_20_body"><draw:frame draw:style-name="fr1" draw:name="images6" text:anchor-type="paragraph" svg:width="13.377cm" svg:height="9.25cm" draw:z-index="5"><draw:image xlink:href="Pictures/1000020100000278000001B5CD7CA852.png" xlink:type="simple" xlink:show="embed" xlink:actuate="onLoad"/></draw:frame></text:p>
      <text:list xml:id="list28744833" text:continue-numbering="true" text:style-name="L4">
        <text:list-header>
          <text:p text:style-name="P4"><text:soft-page-break/></text:p>
        </text:list-header>
      </text:list>
      <text:p text:style-name="Text_20_body">Data Source Name : libre</text:p>
      <text:p text:style-name="Text_20_body">Database Name : chemin de la DB (ex : C:\Users\rasse\_Data_analyst\Formation_Technobel\PlayZone\db_cl_eleveo.db)</text:p>
      <text:p text:style-name="Text_20_body"><draw:frame draw:style-name="fr1" draw:name="images3" text:anchor-type="paragraph" svg:width="7.886cm" svg:height="7.445cm" draw:z-index="2"><draw:image xlink:href="Pictures/1000020100000205000001C7C2A65B22.png" xlink:type="simple" xlink:show="embed" xlink:actuate="onLoad"/></draw:frame></text:p>
      <text:list xml:id="list4115887506036473343" text:style-name="L5">
        <text:list-item>
          <text:p text:style-name="P5">Ouvrir power BI</text:p>
        </text:list-item>
      </text:list>
      <text:p text:style-name="Text_20_body"/>
      <text:list xml:id="list7643267592360846623" text:style-name="L6">
        <text:list-item>
          <text:p text:style-name="P6">Obtenir les données -&gt; Plus ... -&gt; rechercher ODBC</text:p>
        </text:list-item>
      </text:list>
      <text:p text:style-name="Text_20_body"><draw:frame draw:style-name="fr2" draw:name="images4" text:anchor-type="paragraph" svg:width="17cm" svg:height="15.857cm" draw:z-index="3"><draw:image xlink:href="Pictures/100002010000035200000319A614AACE.png" xlink:type="simple" xlink:show="embed" xlink:actuate="onLoad"/></draw:frame><text:soft-page-break/></text:p>
      <text:list xml:id="list7579623449141661064" text:style-name="L7">
        <text:list-item>
          <text:p text:style-name="P7">Selectionner ODBC et Cliquer sur se connecter</text:p>
        </text:list-item>
        <text:list-item>
          <text:p text:style-name="P7">Selectionner le Nom de la source de données defini dans l'admnistrateur de source de données</text:p>
        </text:list-item>
      </text:list>
      <text:p text:style-name="Text_20_body"><draw:frame draw:style-name="fr3" draw:name="images5" text:anchor-type="paragraph" svg:width="15.716cm" svg:height="4.223cm" draw:z-index="4"><draw:image xlink:href="Pictures/10000201000003540000010C4AB2C6AA.png" xlink:type="simple" xlink:show="embed" xlink:actuate="onLoad"/></draw:frame></text:p>
      <text:p text:style-name="Text_20_body"/>
      <text:p text:style-name="Text_20_body"/>
      <text:p text:style-name="Text_20_body"/>
      <text:list xml:id="list28739474" text:continue-numbering="true" text:style-name="L7">
        <text:list-header>
          <text:p text:style-name="P7"><text:soft-page-break/></text:p>
        </text:list-header>
        <text:list-item>
          <text:p text:style-name="P7">Selectionner identification windows</text:p>
        </text:list-item>
      </text:list>
      <text:p text:style-name="Text_20_body"><draw:frame draw:style-name="fr1" draw:name="images7" text:anchor-type="paragraph" svg:width="14.753cm" svg:height="8.424cm" draw:z-index="6"><draw:image xlink:href="Pictures/10000201000002B90000018E08A2D6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 ra</meta:initial-creator>
    <meta:creation-date>2025-11-17T10:30:07.78</meta:creation-date>
    <meta:generator>OpenOffice/4.1.15$Win32 OpenOffice.org_project/4115m2$Build-9813</meta:generator>
    <dc:date>2025-11-27T08:48:26.63</dc:date>
    <dc:creator>max ra</dc:creator>
    <meta:editing-duration>PT16M41S</meta:editing-duration>
    <meta:editing-cycles>4</meta:editing-cycles>
    <meta:document-statistic meta:table-count="0" meta:image-count="7" meta:object-count="0" meta:page-count="4" meta:paragraph-count="15" meta:word-count="104" meta:character-count="672"/>
  </office:meta>
</office:document-meta>
</file>